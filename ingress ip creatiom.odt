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Web" style:list-style-name="LFO2" style:family="paragraph"/>
    <style:style style:name="T10" style:parent-style-name="Strong" style:family="text">
      <style:text-properties fo:font-weight="normal" style:font-weight-asian="normal" style:font-weight-complex="normal" fo:font-size="10pt" style:font-size-asian="10pt" style:font-size-complex="10pt"/>
    </style:style>
    <style:style style:name="T11" style:parent-style-name="Strong" style:family="text">
      <style:text-properties fo:font-size="10pt" style:font-size-asian="10pt" style:font-size-complex="10pt"/>
    </style:style>
    <style:style style:name="P12" style:parent-style-name="NormalWeb" style:list-style-name="LFO2" style:family="paragraph">
      <style:text-properties fo:font-weight="bold" style:font-weight-asian="bold" style:font-weight-complex="bold"/>
    </style:style>
    <style:style style:name="P13" style:parent-style-name="NormalWeb" style:list-style-name="LFO2" style:family="paragraph"/>
    <style:style style:name="P14" style:parent-style-name="Normal" style:family="paragraph">
      <style:paragraph-properties fo:margin-top="0.0694in" fo:margin-bottom="0.0694in"/>
    </style:style>
    <style:style style:name="T15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IN" style:language-asian="en" style:country-asian="IN"/>
    </style:style>
    <style:style style:name="T16" style:parent-style-name="Heading1Char" style:family="text">
      <style:text-properties style:font-name-asian="Calibri"/>
    </style:style>
    <style:style style:name="P17" style:parent-style-name="Normal" style:family="paragraph">
      <style:paragraph-properties fo:margin-top="0.0694in" fo:margin-bottom="0.0694in"/>
      <style:text-properties style:font-name="Times New Roman" style:font-name-asian="Times New Roman" fo:font-size="12pt" style:font-size-asian="12pt" style:font-size-complex="12pt" fo:language="en" fo:country="IN" style:language-asian="en" style:country-asian="IN"/>
    </style:style>
    <style:style style:name="P18" style:parent-style-name="Normal" style:family="paragraph">
      <style:text-properties style:font-name="Times New Roman" style:font-name-asian="Times New Roman" fo:font-size="12pt" style:font-size-asian="12pt" style:font-size-complex="12pt" fo:language="en" fo:country="IN" style:language-asian="en" style:country-asian="IN"/>
    </style:style>
    <style:style style:name="P1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en" fo:country="IN" style:language-asian="en" style:country-asian="IN"/>
    </style:style>
    <style:style style:name="P20" style:parent-style-name="Normal" style:family="paragraph">
      <style:paragraph-properties fo:margin-top="0.0694in" fo:margin-bottom="0.0694in"/>
      <style:text-properties style:font-name="Times New Roman" style:font-name-asian="Times New Roman" fo:font-size="12pt" style:font-size-asian="12pt" style:font-size-complex="12pt" fo:language="en" fo:country="IN" style:language-asian="en" style:country-asian="IN"/>
    </style:style>
    <style:style style:name="P21" style:parent-style-name="Normal" style:family="paragraph">
      <style:text-properties style:font-name="Times New Roman" style:font-name-asian="Times New Roman" fo:font-size="12pt" style:font-size-asian="12pt" style:font-size-complex="12pt" fo:language="en" fo:country="IN" style:language-asian="en" style:country-asian="IN"/>
    </style:style>
    <style:style style:name="P22" style:parent-style-name="ListParagraph" style:list-style-name="LFO2" style:family="paragraph">
      <style:paragraph-properties fo:margin-top="0.0694in" fo:margin-bottom="0.0694in"/>
    </style:style>
    <style:style style:name="T23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IN" style:language-asian="en" style:country-asian="IN"/>
    </style:style>
    <style:style style:name="P25" style:parent-style-name="Normal" style:family="paragraph">
      <style:paragraph-properties fo:margin-top="0.0694in" fo:margin-bottom="0.0694in"/>
      <style:text-properties style:font-name="Times New Roman" style:font-name-asian="Times New Roman" fo:font-size="12pt" style:font-size-asian="12pt" style:font-size-complex="12pt" fo:language="en" fo:country="IN" style:language-asian="en" style:country-asian="IN"/>
    </style:style>
    <style:style style:name="P26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P27" style:parent-style-name="Normal" style:family="paragraph">
      <style:paragraph-properties fo:margin-top="0.0694in" fo:margin-bottom="0.0694in"/>
      <style:text-properties style:font-name="Times New Roman" style:font-name-asian="Times New Roman" fo:font-size="12pt" style:font-size-asian="12pt" style:font-size-complex="12pt" fo:language="en" fo:country="IN" style:language-asian="en" style:country-asian="IN"/>
    </style:style>
    <style:style style:name="P28" style:parent-style-name="NormalWeb" style:family="paragraph">
      <style:text-properties fo:font-weight="bold" style:font-weight-asian="bold" style:font-weight-complex="bold"/>
    </style:style>
    <style:style style:name="P29" style:parent-style-name="NormalWeb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Web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Web" style:family="paragraph">
      <style:text-properties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How to create service IP, internal IP and ingress IP: -</text:p>
      <text:p text:style-name="Normal"/>
      <text:list text:style-name="LFO1" text:continue-numbering="true">
        <text:list-item>
          <text:p text:style-name="P2">We login putty with our common credential.</text:p>
        </text:list-item>
        <text:list-item>
          <text:p text:style-name="P3">Check the pwd</text:p>
        </text:list-item>
        <text:list-item>
          <text:p text:style-name="P4">Move your internal.yml and ingress-controller-internal.yml from current location (Download) to<text:s/><text:a xlink:href="mailto:/home/rrai3014@7-11.com" office:target-frame-name="_top" xlink:show="replace"><text:span text:style-name="Hyperlink">/home/rrai3014@7-11.com</text:span></text:a><text:s/>with the help od win SCP. then only we can see the file in our current directory.</text:p>
        </text:list-item>
        <text:list-item>
          <text:p text:style-name="P5">Check with ls cmd your file is reflection or not</text:p>
        </text:list-item>
        <text:list-item>
          <text:p text:style-name="P6"/>
        </text:list-item>
      </text:list>
      <text:p text:style-name="ListParagraph"><draw:frame draw:style-name="a0" draw:name="Picture 1" text:anchor-type="as-char" svg:x="0in" svg:y="0in" svg:width="6.5in" svg:height="4.43194in" style:rel-width="scale" style:rel-height="scale"><draw:image xlink:href="media/image1.png" xlink:type="simple" xlink:show="embed" xlink:actuate="onLoad"/><svg:title/><svg:desc/></draw:frame></text:p>
      <text:p text:style-name="ListParagraph"/>
      <text:p text:style-name="ListParagraph">7-check with cat each file and if needed any change then with the help of vi you can edit the app name. don’t put any numeric or capital letter .</text:p>
      <text:p text:style-name="ListParagraph">8-you have to open with vi and type in key board i to insert or edit. then type esc+shift+:wq to save.</text:p>
      <text:p text:style-name="ListParagraph"><draw:frame draw:style-name="a1" draw:name="Picture 1" text:anchor-type="as-char" svg:x="0in" svg:y="0in" svg:width="5.72997in" svg:height="1.86484in" style:rel-width="scale" style:rel-height="scale"><draw:image xlink:href="media/image2.png" xlink:type="simple" xlink:show="embed" xlink:actuate="onLoad"/><svg:title/><svg:desc/></draw:frame></text:p>
      <text:soft-page-break/>
      <text:p text:style-name="ListParagraph">9-same as do for ingress too</text:p>
      <text:p text:style-name="ListParagraph"><draw:frame draw:style-name="a2" draw:name="Picture 1" text:anchor-type="as-char" svg:x="0in" svg:y="0in" svg:width="6.39673in" svg:height="1.2085in" style:rel-width="scale" style:rel-height="scale"><draw:image xlink:href="media/image3.png" xlink:type="simple" xlink:show="embed" xlink:actuate="onLoad"/><svg:title/><svg:desc/></draw:frame></text:p>
      <text:p text:style-name="ListParagraph"/>
      <text:p text:style-name="ListParagraph">10-now all set with both files then we have to login relevant cluster (ex- aksd-apic-002) to create new service IP</text:p>
      <text:p text:style-name="ListParagraph">az account set --subscription "Enterprise Dev/Test Subscription" &amp;&amp; az aks get-credentials --resource-group RG-Dev-APIC<text:s/>--name aksd-apic-002</text:p>
      <text:p text:style-name="ListParagraph">11-confirm the cluster with cmd <text:s/>kubectl config current-context</text:p>
      <text:p text:style-name="ListParagraph"><draw:frame draw:style-name="a3" draw:name="Picture 1" text:anchor-type="as-char" svg:x="0in" svg:y="0in" svg:width="6.5in" svg:height="1.09375in" style:rel-width="scale" style:rel-height="scale"><draw:image xlink:href="media/image4.png" xlink:type="simple" xlink:show="embed" xlink:actuate="onLoad"/><svg:title/><svg:desc/></draw:frame></text:p>
      <text:p text:style-name="ListParagraph"/>
      <text:p text:style-name="ListParagraph">12- with the help of cmd <text:s/><text:span text:style-name="T7">kubectl get svc</text:span><text:s/>check the current services</text:p>
      <text:p text:style-name="ListParagraph">13- with the help of cmd<text:s/><text:span text:style-name="T8">kubectl get svc | grep tren</text:span><text:s/>(service name)</text:p>
      <text:p text:style-name="ListParagraph"><draw:frame draw:style-name="a4" draw:name="Picture 1" text:anchor-type="as-char" svg:x="0in" svg:y="0in" svg:width="6.5in" svg:height="0.56042in" style:rel-width="scale" style:rel-height="scale"><draw:image xlink:href="media/image5.png" xlink:type="simple" xlink:show="embed" xlink:actuate="onLoad"/><svg:title/><svg:desc/></draw:frame></text:p>
      <text:p text:style-name="ListParagraph"/>
      <text:p text:style-name="ListParagraph">14-now we can run the command to create service IP</text:p>
      <text:list text:style-name="LFO2" text:continue-numbering="true">
        <text:list-item>
          <text:p text:style-name="P9"><text:span text:style-name="T10">First  Create Private IP (Using the below file</text:span><text:span text:style-name="T11">)</text:span><text:s/><text:a office:title="https://711com-my.sharepoint.com/personal/bharath_rajendran_7-11_com/documents/microsoft%20teams%20chat%20files/internal-ip.yml?isspofile=1" xlink:href="https://711com-my.sharepoint.com/personal/bharath_rajendran_7-11_com/Documents/Microsoft%20Teams%20Chat%20Files/internal-IP.yml?isSPOFile=1" office:target-frame-name="_top" xlink:show="replace"><text:span text:style-name="Hyperlink">internal-IP.yml</text:span></text:a></text:p>
        </text:list-item>
        <text:list-item>
          <text:p text:style-name="P12">kubectl create -f internalip.yml</text:p>
        </text:list-item>
        <text:list-item>
          <text:p text:style-name="P13">Then allocate this ip to as a service ip to trends app</text:p>
        </text:list-item>
      </text:list>
      <text:p text:style-name="NormalWeb">15- we can proceed for ingress Ip</text:p>
      <text:p text:style-name="NormalWeb"><text:s text:c="4"/>a)for ingress again we need to create one internal ip</text:p>
      <text:p text:style-name="NormalWeb">b). install helm</text:p>
      <text:p text:style-name="P14"><text:span text:style-name="T15">c).</text:span><text:span text:style-name="T16"><text:s/></text:span><text:span text:style-name="Strong">First  Create Private IP (Using the<text:s/></text:span><text:a office:title="https://711com-my.sharepoint.com/personal/bharath_rajendran_7-11_com/documents/microsoft%20teams%20chat%20files/internal-ip.yml?isspofile=1" xlink:href="https://711com-my.sharepoint.com/personal/bharath_rajendran_7-11_com/Documents/Microsoft%20Teams%20Chat%20Files/internal-IP.yml?isSPOFile=1" office:target-frame-name="_top" xlink:show="replace"><text:span text:style-name="Hyperlink">internal-IP.yml</text:span></text:a><text:span text:style-name="Strong"><text:s text:c="2"/>file)</text:span></text:p>
      <text:p text:style-name="P17">d) Update the private ip in internal-ingress yaml</text:p>
      <text:p text:style-name="P18"/>
      <text:p text:style-name="P19">helm repo add ingress-nginx https://kubernetes.github.io/ingress-nginx</text:p>
      <text:p text:style-name="P20"> </text:p>
      <text:p text:style-name="P21"> </text:p>
      <text:list text:style-name="LFO2" text:continue-numbering="true">
        <text:list-item>
          <text:p text:style-name="P22"><text:span text:style-name="T23">Ingress Command :<text:s/></text:span><text:span text:style-name="T24">helm install exp-store-orch-controller ingress-nginx/ingress-nginx --namespace kube-system -f ingress-controller-internal.yml --set controller.replicaCount=1 --set controller.ingressClassResource.name=exp-store-orch-api</text:span></text:p>
        </text:list-item>
      </text:list>
      <text:soft-page-break/>
      <text:p text:style-name="P25">16-check the ingress with command<text:s/></text:p>
      <text:p text:style-name="P26">kubectl<text:s/>--namespace kube-system get services -o wide -w cycle-count-api-ingress-nginx-controller</text:p>
      <text:p text:style-name="P27">or</text:p>
      <text:p text:style-name="P28">kubectl get svc -n kube-system</text:p>
      <text:p text:style-name="P29"/>
      <text:p text:style-name="NormalWeb"><text:span text:style-name="T30"><draw:frame draw:style-name="a5" draw:name="Picture 1" text:anchor-type="as-char" svg:x="0in" svg:y="0in" svg:width="6.5in" svg:height="2.90486in" style:rel-width="scale" style:rel-height="scale"><draw:image xlink:href="media/image6.png" xlink:type="simple" xlink:show="embed" xlink:actuate="onLoad"/><svg:title/><svg:desc/></draw:frame></text:span></text:p>
      <text:p text:style-name="P31"/>
      <text:p text:style-name="NormalWeb"><text:span text:style-name="T32">17-<text:s/></text:span>first it will show in pending state because the ingress in allocated with service ip<text:s/></text:p>
      <text:p text:style-name="NormalWeb"><text:s text:c="3"/>So its working as a service ip<text:s/>till now . after that we need to delete the service ip to work as a <text:s text:c="6"/>ingress because at a time it can work for one thing .</text:p>
      <text:p text:style-name="NormalWeb"><draw:frame draw:style-name="a6" draw:name="Picture 1" text:anchor-type="as-char" svg:x="0in" svg:y="0in" svg:width="6.5in" svg:height="1.41944in" style:rel-width="scale" style:rel-height="scale"><draw:image xlink:href="media/image7.png" xlink:type="simple" xlink:show="embed" xlink:actuate="onLoad"/><svg:title/><svg:desc/></draw:frame></text:p>
      <text:p text:style-name="NormalWeb">18-after deleting internal ip or service ip it will take 5 min to update ingress then it would be assign and it will not show as a pending state.</text:p>
      <text:p text:style-name="NormalWeb">19- then we have to send DNS allocation request to take that ip and app name from snow portle.</text:p>
      <text:p text:style-name="NormalWeb">Ex:- Please create a  DNS record for the Internal Application.</text:p>
      <text:p text:style-name="NormalWeb">Name :7trends-api-dev.7-11.com<text:line-break/>IP Address: 172.19.33.237</text:p>
      <text:p text:style-name="NormalWeb">Ref ticket:-<text:s/>INC9942224</text:p>
      <text:p text:style-name="NormalWeb"/>
      <text:soft-page-break/>
      <text:p text:style-name="NormalWeb">20 – after allocation we can request for SSL cert and tls host name then we can modify the yml file too refer as 7cast app . after that we can run the pipeline.</text:p>
      <text:p text:style-name="NormalWeb"/>
      <text:p text:style-name="NormalWeb"/>
      <text:p text:style-name="P33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1F4E79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1F4E79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1F4E79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/>
    </style:style>
    <style:style style:name="Title" style:display-name="Title" style:family="paragraph" style:parent-style-name="Normal" style:next-style-name="Normal">
      <style:paragraph-properties style:contextual-spacing="true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F4E79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yperlink" style:display-name="Hyperlink" style:family="text" style:parent-style-name="DefaultParagraphFont">
      <style:text-properties fo:color="#1F4E79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F4E79" fo:hyphenate="false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Calibri Light" style:font-name-asian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PlaceholderText" style:display-name="Placeholder Text" style:family="text" style:parent-style-name="DefaultParagraphFont">
      <style:text-properties fo:color="#3B3838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/>
    <style:style style:name="TOC9" style:display-name="TOC 9" style:family="paragraph" style:parent-style-name="Normal" style:next-style-name="Normal" style:auto-update="true">
      <style:paragraph-properties fo:margin-bottom="0.0833in" fo:margin-left="1.2201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fo:language="en" fo:country="IN" style:language-asian="en" style:country-asian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-asian="Times New Roman" fo:font-weight="bold" style:font-weight-asian="bold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shmi Rai</meta:initial-creator>
    <dc:creator>Rashmi Rai</dc:creator>
    <meta:creation-date>2024-08-30T10:06:00Z</meta:creation-date>
    <dc:date>2025-07-30T10:06:00Z</dc:date>
    <meta:template xlink:href="%7bCF99A085-88C0-4FA9-AA48-494FADDE15C8%7dtf02786999_win32" xlink:type="simple"/>
    <meta:editing-cycles>3</meta:editing-cycles>
    <meta:editing-duration>PT10806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ge-count="4" meta:paragraph-count="6" meta:word-count="518" meta:character-count="3465" meta:row-count="24" meta:non-whitespace-character-count="2953"/>
  </office:meta>
</office:document-meta>
</file>